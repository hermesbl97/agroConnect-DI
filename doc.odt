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29b1f" officeooo:paragraph-rsid="00129b1f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>
      <style:text-properties fo:font-weight="bold"/>
    </style:style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Standard">
      <style:text-properties officeooo:rsid="00158ba6" officeooo:paragraph-rsid="00158ba6"/>
    </style:style>
    <style:style style:name="P9" style:family="paragraph" style:parent-style-name="Text_20_body" style:list-style-name="L7">
      <style:text-properties fo:font-weight="bold"/>
    </style:style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Standard">
      <style:text-properties fo:color="#c9d1d9" loext:opacity="100%" style:font-name="Droid Sans Mono" fo:font-size="10.5pt" fo:font-weight="normal" fo:background-color="#121314"/>
    </style:style>
    <style:style style:name="P14" style:family="paragraph" style:parent-style-name="Standard">
      <style:text-properties fo:color="#c9d1d9" loext:opacity="100%" style:font-name="Droid Sans Mono" fo:font-size="10.5pt" fo:font-weight="normal" officeooo:rsid="0018f710" officeooo:paragraph-rsid="0018f710" fo:background-color="#121314"/>
    </style:style>
    <style:style style:name="P15" style:family="paragraph" style:parent-style-name="Text_20_body">
      <style:text-properties officeooo:rsid="0015a651" officeooo:paragraph-rsid="0015a651"/>
    </style:style>
    <style:style style:name="P16" style:family="paragraph" style:parent-style-name="Text_20_body" style:list-style-name="L11">
      <style:text-properties officeooo:rsid="0015a651"/>
    </style:style>
    <style:style style:name="P17" style:family="paragraph" style:parent-style-name="Standard">
      <style:text-properties officeooo:rsid="0019087f" officeooo:paragraph-rsid="0015a651"/>
    </style:style>
    <style:style style:name="P18" style:family="paragraph" style:parent-style-name="Standard">
      <style:text-properties officeooo:rsid="001e101f" officeooo:paragraph-rsid="0015a651"/>
    </style:style>
    <style:style style:name="T1" style:family="text">
      <style:text-properties officeooo:rsid="00115b21"/>
    </style:style>
    <style:style style:name="T2" style:family="text">
      <style:text-properties fo:font-weight="bold"/>
    </style:style>
    <style:style style:name="T3" style:family="text">
      <style:text-properties officeooo:rsid="00138ba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aterial Symbols → <text:span text:style-name="T1">iconos de la tarjeta de productos</text:span></text:p>
      <text:p text:style-name="Standard"/>
      <text:p text:style-name="P1">Punto 4:</text:p>
      <text:list text:style-name="L1">
        <text:list-item>
          <text:p text:style-name="P2"><text:span text:style-name="T2">Visualización dinámica:</text:span> Ya la tienes. Al cambiar el buscador o el checkbox, la interfaz reacciona al instante sin recargar la página.</text:p>
        </text:list-item>
      </text:list>
      <text:list text:style-name="L2">
        <text:list-item>
          <text:p text:style-name="P3"><text:span text:style-name="T2">Tabla/Grid con ordenación y filtrado reactivo:</text:span> Ya lo tienes implementado (filtros de ecosistema, búsqueda por nombre y orden por tiempo).</text:p>
        </text:list-item>
      </text:list>
      <text:list text:style-name="L3">
        <text:list-item>
          <text:p text:style-name="P4">Gestión de estados:</text:p>
        </text:list-item>
      </text:list>
      <text:list text:style-name="L4">
        <text:list-item>
          <text:p text:style-name="P5"><text:span text:style-name="T2">Carga:</text:span> Usas tu <text:span text:style-name="Source_20_Text">LoadingStatus</text:span>.</text:p>
        </text:list-item>
        <text:list-item>
          <text:p text:style-name="P5"><text:span text:style-name="T2">Error:</text:span> Usas tu <text:span text:style-name="Source_20_Text">ErrorStatus</text:span>.</text:p>
        </text:list-item>
        <text:list-item>
          <text:p text:style-name="P5"><text:span text:style-name="T2">Ausencia de datos:</text:span> Ya tenemos el <text:span text:style-name="Source_20_Text">div</text:span> que dice "No se encontraron semillas" si el filtro no coincide con nada.</text:p>
        </text:list-item>
      </text:list>
      <text:p text:style-name="Standard"><text:line-break/><text:span text:style-name="T3">Token jwt<text:line-break/></text:span><text:span text:style-name="T2">Persistencia Real:</text:span> Al recibir un "token" (aunque sea un string generado por nosotros), tu React puede guardarlo en el <text:span text:style-name="Source_20_Text">localStorage</text:span>. Si refrescas la página, el usuario no pierde la sesión porque el Frontend "recuerda" que tiene ese token.</text:p>
      <text:list text:style-name="L5">
        <text:list-item>
          <text:p text:style-name="P6"><text:span text:style-name="T2">Protección de Rutas:</text:span> Ahora puedes programar en React que, si el "token" no existe, la aplicación te redirija siempre al <text:span text:style-name="Source_20_Text">/login</text:span>.</text:p>
        </text:list-item>
      </text:list>
      <text:list text:style-name="L6">
        <text:list-item>
          <text:p text:style-name="P7"><text:span text:style-name="T2">Control de Roles:</text:span> Como la API ahora te envía el <text:span text:style-name="Source_20_Text">role</text:span>, puedes programar en tu Navbar que el agricultor vea unos botones y el administrador otros, basándote en un dato que viene del servidor, no inventado en el cliente.</text:p>
        </text:list-item>
      </text:list>
      <text:p text:style-name="Standard"/>
      <text:p text:style-name="Standard"/>
      <text:p text:style-name="P8">Reducer:</text:p>
      <text:list text:style-name="L7">
        <text:list-item>
          <text:p text:style-name="P9">Estado Global (Reducer + Context):</text:p>
        </text:list-item>
      </text:list>
      <text:list text:style-name="L8">
        <text:list-item>
          <text:p text:style-name="P10"><text:span text:style-name="Source_20_Text">user</text:span>: Para saber quién está dentro en toda la App.</text:p>
        </text:list-item>
        <text:list-item>
          <text:p text:style-name="P10"><text:span text:style-name="Source_20_Text">token</text:span>: Para que todas las páginas puedan hacer peticiones API.</text:p>
        </text:list-item>
        <text:list-item>
          <text:p text:style-name="P10"><text:span text:style-name="Source_20_Text">loading/error de Auth</text:span>: Para gestionar el proceso de inicio de sesión.</text:p>
        </text:list-item>
      </text:list>
      <text:list text:style-name="L9">
        <text:list-item>
          <text:p text:style-name="P11"><text:span text:style-name="T2">Estado Local (</text:span><text:span text:style-name="Source_20_Text"><text:span text:style-name="T2">useState</text:span></text:span><text:span text:style-name="T2">):</text:span></text:p>
        </text:list-item>
      </text:list>
      <text:list text:style-name="L10">
        <text:list-item>
          <text:p text:style-name="P12"><text:span text:style-name="Source_20_Text">formData</text:span> en Registro: Datos temporales de los inputs.</text:p>
        </text:list-item>
        <text:list-item>
          <text:p text:style-name="P12"><text:span text:style-name="Source_20_Text">query</text:span> y <text:span text:style-name="Source_20_Text">filters</text:span> en Productos: Solo afectan a la visualización de esa lista.</text:p>
        </text:list-item>
        <text:list-item>
          <text:p text:style-name="P12"><text:span text:style-name="Source_20_Text">users</text:span> y <text:span text:style-name="Source_20_Text">products</text:span>: Los datos de las tablas (se cargan y se mueren cuando cierras la pestaña).</text:p>
        </text:list-item>
      </text:list>
      <text:p text:style-name="Standard"/>
      <text:p text:style-name="P13"/>
      <text:p text:style-name="P14">explicación</text:p>
      <text:p text:style-name="P15"><text:span text:style-name="Source_20_Text"><text:span text:style-name="T2">[name]</text:span></text:span>: Es una propiedad dinámica. Si escribes en el input "email", <text:span text:style-name="Source_20_Text">name</text:span> vale "email".</text:p>
      <text:list text:style-name="L11">
        <text:list-item>
          <text:p text:style-name="P16"><text:soft-page-break/><text:span text:style-name="Source_20_Text"><text:span text:style-name="T2">Number(value)</text:span></text:span>: Es el equivalente al <text:span text:style-name="Source_20_Text">Integer.parseInt(value)</text:span> que usas en Java.</text:p>
        </text:list-item>
      </text:list>
      <text:p text:style-name="P17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1T17:52:29.485178647</meta:creation-date>
    <dc:date>2026-05-06T19:54:01.434771017</dc:date>
    <meta:editing-duration>PT3H59M3S</meta:editing-duration>
    <meta:editing-cycles>9</meta:editing-cycles>
    <meta:generator>LibreOffice/25.8.6.2$Linux_X86_64 LibreOffice_project/a46b460d1686bb49c718d2ef5f88b83ff2dc4981</meta:generator>
    <meta:document-statistic meta:table-count="0" meta:image-count="0" meta:object-count="0" meta:page-count="2" meta:paragraph-count="23" meta:word-count="303" meta:character-count="1764" meta:non-whitespace-character-count="1500"/>
  </office:meta>
</office:document-meta>
</file>